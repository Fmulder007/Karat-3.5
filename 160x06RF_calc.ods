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="2.24pt solid 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26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1423.08" calcext:value-type="float">
            <text:p>1423,08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1423.08" calcext:value-type="float">
            <text:p>1423,0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2846.16" calcext:value-type="float">
            <text:p>2846,16</text:p>
          </table:table-cell>
        </table:table-row>
      </table:table>
      <table:table table:name="160x05PA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393.75" calcext:value-type="float">
            <text:p>3393,75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393.75" calcext:value-type="float">
            <text:p>3393,75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Итого</text:p>
          </table:table-cell>
          <table:covered-table-cell/>
          <table:table-cell table:style-name="ce12" table:formula="of:=SUM([.D220:.D221])" office:value-type="float" office:value="6787.5" calcext:value-type="float">
            <text:p>678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1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Кварц 16МГц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Кварц 32МГц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ечатная плата</text:p>
          </table:table-cell>
          <table:covered-table-cell table:style-name="ce13"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3])" office:value-type="float" office:value="1262.7" calcext:value-type="float">
            <text:p>1262,7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Итого</text:p>
          </table:table-cell>
          <table:covered-table-cell/>
          <table:table-cell table:style-name="ce12" table:formula="of:=SUM([.D14:.D15])" office:value-type="float" office:value="2262.7" calcext:value-type="float">
            <text:p>2262,7</text:p>
          </table:table-cell>
        </table:table-row>
      </table:table>
      <table:table table:name="ATU" table:style-name="ta1"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]*[.B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2]*[.B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]*[.B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*[.B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]*[.B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Т50-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8]*[.B8]" office:value-type="float" office:value="175" calcext:value-type="float">
            <text:p>175</text:p>
          </table:table-cell>
        </table:table-row>
        <table:table-row table:style-name="ro2">
          <table:table-cell table:style-name="ce13" office:value-type="string" calcext:value-type="string">
            <text:p>HK4100F-DC12V-SHG 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C9]*[.B9]" office:value-type="float" office:value="650" calcext:value-type="float">
            <text:p>650</text:p>
          </table:table-cell>
        </table:table-row>
        <table:table-row table:style-name="ro1">
          <table:table-cell table:style-name="ce13" office:value-type="string" calcext:value-type="string">
            <text:p>PIC16F1938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10]*[.B10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M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B12]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 table:number-columns-spanned="3" table:number-rows-spanned="1">
            <text:p>Итого деталей</text:p>
          </table:table-cell>
          <table:covered-table-cell table:number-columns-repeated="2"/>
          <table:table-cell table:formula="of:=SUM([.D1:.D13])" office:value-type="float" office:value="1791" calcext:value-type="float">
            <text:p>1791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Итого с работой</text:p>
          </table:table-cell>
          <table:covered-table-cell table:number-columns-repeated="2"/>
          <table:table-cell table:formula="of:=[.D14]*2" office:value-type="float" office:value="3582" calcext:value-type="float">
            <text:p>3582</text:p>
          </table:table-cell>
        </table:table-row>
      </table:table>
      <table:table table:name="Сумма всего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6]+[$160x05PA.D222]+[$160x06RF.D234]" office:value-type="float" office:value="11896.36" calcext:value-type="float">
            <text:p>11896,36</text:p>
          </table:table-cell>
        </table:table-row>
        <table:table-row table:style-name="ro3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2896.36" calcext:value-type="float">
            <text:p>12896,36</text:p>
          </table:table-cell>
        </table:table-row>
        <table:table-row table:style-name="ro1">
          <table:table-cell office:value-type="string" calcext:value-type="string">
            <text:p>Автотюнер</text:p>
          </table:table-cell>
          <table:table-cell table:style-name="ce26" table:formula="of:=[$ATU.D15]"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4])" office:value-type="float" office:value="16478.36" calcext:value-type="float">
            <text:p>16478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5-19T12:48:09.678000000</dc:date>
    <meta:editing-duration>PT12H34M12S</meta:editing-duration>
    <meta:editing-cycles>11</meta:editing-cycles>
    <meta:generator>LibreOffice/7.4.2.3$Windows_X86_64 LibreOffice_project/382eef1f22670f7f4118c8c2dd222ec7ad009daf</meta:generator>
    <meta:document-statistic meta:table-count="5" meta:cell-count="1905" meta:object-count="0"/>
  </office:meta>
</office:document-meta>
</file>