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32cm" fo:break-before="auto" style:use-optimal-row-height="fals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639cm" fo:break-before="auto" style:use-optimal-row-height="false"/>
    </style:style>
    <style:style style:name="ro9" style:family="table-row">
      <style:table-row-properties style:row-height="1.124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Для Карат-3" table:style-name="ta1">
        <table:table-column table:style-name="co1" table:number-columns-repeated="2" table:default-cell-style-name="ce29"/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</table:table-row>
        <table:table-row table:style-name="ro4"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08" calcext:value-type="float">
            <text:p>208</text:p>
          </table:table-cell>
        </table:table-row>
        <table:table-row table:style-name="ro4"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-2" calcext:value-type="float">
            <text:p>-2</text:p>
          </table:table-cell>
        </table:table-row>
        <table:table-row table:style-name="ro4"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0" calcext:value-type="float">
            <text:p>70</text:p>
          </table:table-cell>
        </table:table-row>
        <table:table-row table:style-name="ro4"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2105100" calcext:value-type="float">
            <text:p>22105100</text:p>
          </table:table-cell>
        </table:table-row>
        <table:table-row table:style-name="ro4"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22105100" calcext:value-type="float">
            <text:p>22105100</text:p>
          </table:table-cell>
        </table:table-row>
        <table:table-row table:style-name="ro4"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1105300" calcext:value-type="float">
            <text:p>21105300</text:p>
          </table:table-cell>
        </table:table-row>
        <table:table-row table:style-name="ro4"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1105100" calcext:value-type="float">
            <text:p>21105100</text:p>
          </table:table-cell>
        </table:table-row>
        <table:table-row table:style-name="ro4"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4">
          <table:table-cell table:style-name="ce28" office:value-type="float" office:value="109" calcext:value-type="float">
            <text:p>109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4000" calcext:value-type="float">
            <text:p>4000</text:p>
          </table:table-cell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29"/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</table:table-row>
        <table:table-row table:style-name="ro5">
          <table:table-cell table:style-name="ce30" office:value-type="string" calcext:value-type="string" table:number-columns-spanned="2" table:number-rows-spanned="1">
            <text:p>№ платы ______</text:p>
          </table:table-cell>
          <table:covered-table-cell table:style-name="ce28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</table:table-row>
        <table:table-row table:style-name="ro4"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08" calcext:value-type="float">
            <text:p>208</text:p>
          </table:table-cell>
        </table:table-row>
        <table:table-row table:style-name="ro4"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-2" calcext:value-type="float">
            <text:p>-2</text:p>
          </table:table-cell>
        </table:table-row>
        <table:table-row table:style-name="ro4"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7007700" calcext:value-type="float">
            <text:p>27007700</text:p>
          </table:table-cell>
        </table:table-row>
        <table:table-row table:style-name="ro4"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3558000" calcext:value-type="float">
            <text:p>13558000</text:p>
          </table:table-cell>
        </table:table-row>
        <table:table-row table:style-name="ro4"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561000" calcext:value-type="float">
            <text:p>13561000</text:p>
          </table:table-cell>
        </table:table-row>
        <table:table-row table:style-name="ro4"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4441500" calcext:value-type="float">
            <text:p>34441500</text:p>
          </table:table-cell>
        </table:table-row>
        <table:table-row table:style-name="ro4"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4000" calcext:value-type="float">
            <text:p>4000</text:p>
          </table:table-cell>
        </table:table-row>
        <table:table-row table:style-name="ro4"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000" calcext:value-type="float">
            <text:p>8000</text:p>
          </table:table-cell>
        </table:table-row>
        <table:table-row table:style-name="ro4"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000" calcext:value-type="float">
            <text:p>13000</text:p>
          </table:table-cell>
        </table:table-row>
        <table:table-row table:style-name="ro4"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0000" calcext:value-type="float">
            <text:p>20000</text:p>
          </table:table-cell>
        </table:table-row>
        <table:table-row table:style-name="ro4" table:number-rows-repeated="104856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3" table:style-name="ta1">
        <table:shapes>
          <draw:custom-shape draw:z-index="0" draw:name="Фигура 3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4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13</text:sheet-name></text:p>
          </table:table-cell>
          <table:table-cell table:style-name="ce47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6100" calcext:value-type="float">
            <text:p>479961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50" calcext:value-type="float" table:number-columns-spanned="2" table:number-rows-spanned="1">
            <text:p>3200195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6600" calcext:value-type="float">
            <text:p>344366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000" calcext:value-type="float">
            <text:p>20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office:value-type="float" office:value="113" calcext:value-type="float">
            <text:p>113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office:value-type="float" office:value="208" calcext:value-type="float" table:number-columns-spanned="2" table:number-rows-spanned="1">
            <text:p>208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3" calcext:value-type="float" table:number-columns-spanned="2" table:number-rows-spanned="1">
            <text:p>-3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32001950" calcext:value-type="float">
            <text:p>32001950</text:p>
          </table:table-cell>
          <table:table-cell office:value-type="float" office:value="32001950" calcext:value-type="float" table:number-columns-spanned="2" table:number-rows-spanned="1">
            <text:p>3200195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office:value-type="float" office:value="13558300" calcext:value-type="float" table:number-columns-spanned="2" table:number-rows-spanned="1">
            <text:p>135583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office:value-type="float" office:value="13560900" calcext:value-type="float" table:number-columns-spanned="2" table:number-rows-spanned="1">
            <text:p>135609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36600" calcext:value-type="float">
            <text:p>34436600</text:p>
          </table:table-cell>
          <table:table-cell office:value-type="float" office:value="34436600" calcext:value-type="float" table:number-columns-spanned="2" table:number-rows-spanned="1">
            <text:p>344366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office:value-type="float" office:value="4000" calcext:value-type="float" table:number-columns-spanned="2" table:number-rows-spanned="1">
            <text:p>40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office:value-type="float" office:value="8000" calcext:value-type="float" table:number-columns-spanned="2" table:number-rows-spanned="1">
            <text:p>80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" calcext:value-type="float" table:number-columns-spanned="2" table:number-rows-spanned="1">
            <text:p>130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" calcext:value-type="float" table:number-columns-spanned="2" table:number-rows-spanned="1">
            <text:p>20000</text:p>
          </table:table-cell>
          <table:covered-table-cell/>
          <table: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1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1" calcext:value-type="string">
            <text:p>№121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2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8000" calcext:value-type="float" table:number-columns-spanned="2" table:number-rows-spanned="1">
            <text:p>27008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2" calcext:value-type="string">
            <text:p>№122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8000" calcext:value-type="float">
            <text:p>27008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3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800" calcext:value-type="float">
            <text:p>135608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500" calcext:value-type="float" table:number-columns-spanned="2" table:number-rows-spanned="1">
            <text:p>270075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500" calcext:value-type="float">
            <text:p>270075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4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4" calcext:value-type="float">
            <text:p>124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300" calcext:value-type="float" table:number-columns-spanned="2" table:number-rows-spanned="1">
            <text:p>270003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0300" calcext:value-type="float">
            <text:p>270003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5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5" calcext:value-type="float">
            <text:p>12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200" calcext:value-type="float">
            <text:p>135582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400" calcext:value-type="float">
            <text:p>135594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7100" calcext:value-type="float">
            <text:p>34437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700" calcext:value-type="float">
            <text:p>270077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7900" calcext:value-type="float">
            <text:p>135579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7100" calcext:value-type="float">
            <text:p>34437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6" calcext:value-type="float">
            <text:p>12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600" calcext:value-type="float" table:number-columns-spanned="2" table:number-rows-spanned="1">
            <text:p>270076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100" calcext:value-type="float">
            <text:p>34445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600" calcext:value-type="float">
            <text:p>270076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100" calcext:value-type="float">
            <text:p>34445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7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4400" calcext:value-type="float">
            <text:p>480044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6999800" calcext:value-type="float" table:number-columns-spanned="2" table:number-rows-spanned="1">
            <text:p>26999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4700" calcext:value-type="float">
            <text:p>34444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27" calcext:value-type="string">
            <text:p>127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6999800" calcext:value-type="float">
            <text:p>26999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4700" calcext:value-type="float">
            <text:p>34444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8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9200" calcext:value-type="float">
            <text:p>479992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800" calcext:value-type="float" table:number-columns-spanned="2" table:number-rows-spanned="1">
            <text:p>27007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9700" calcext:value-type="float">
            <text:p>34439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28" calcext:value-type="string">
            <text:p>128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27007800" calcext:value-type="float">
            <text:p>270078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39700" calcext:value-type="float">
            <text:p>344397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table table:name="12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9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6100" calcext:value-type="float">
            <text:p>479961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6998800" calcext:value-type="float" table:number-columns-spanned="2" table:number-rows-spanned="1">
            <text:p>26998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6600" calcext:value-type="float">
            <text:p>344366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29" calcext:value-type="string">
            <text:p>129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26998800" calcext:value-type="float">
            <text:p>269988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36600" calcext:value-type="float">
            <text:p>344366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table table:name="13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30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4700" calcext:value-type="float">
            <text:p>480047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0200" calcext:value-type="float" table:number-columns-spanned="2" table:number-rows-spanned="1">
            <text:p>320002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30" calcext:value-type="string">
            <text:p>13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32000200" calcext:value-type="float">
            <text:p>320002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table table:name="13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31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0800" calcext:value-type="float" table:number-columns-spanned="2" table:number-rows-spanned="1">
            <text:p>32000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31" calcext:value-type="string">
            <text:p>131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32000800" calcext:value-type="float">
            <text:p>320008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table table:name="13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32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8003600" calcext:value-type="float">
            <text:p>480036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0800" calcext:value-type="float" table:number-columns-spanned="2" table:number-rows-spanned="1">
            <text:p>32000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3800" calcext:value-type="float">
            <text:p>344438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32" calcext:value-type="string">
            <text:p>132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32000800" calcext:value-type="float">
            <text:p>320008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43800" calcext:value-type="float">
            <text:p>344438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5-26T00:14:00.143000000</dc:date>
    <meta:editing-duration>PT16H10M35S</meta:editing-duration>
    <meta:editing-cycles>72</meta:editing-cycles>
    <meta:generator>LibreOffice/7.4.2.3$Windows_X86_64 LibreOffice_project/382eef1f22670f7f4118c8c2dd222ec7ad009daf</meta:generator>
    <meta:print-date>2026-02-02T17:35:54.377000000</meta:print-date>
    <meta:document-statistic meta:table-count="22" meta:cell-count="1025" meta:object-count="40"/>
  </office:meta>
</office:document-meta>
</file>